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64000001146AF6BDA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72cm" svg:height="3.175cm" svg:x="21.447cm" svg:y="15.986cm">
          <draw:image xlink:href="Pictures/1000000000000264000001146AF6BDA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iyang Ong</meta:initial-creator>
    <meta:creation-date>2026-06-07T21:34:12</meta:creation-date>
    <dc:date>2026-06-07T23:12:43</dc:date>
    <dc:creator>Zhiyang Ong</dc:creator>
    <meta:editing-duration>PT1H38M32S</meta:editing-duration>
    <meta:editing-cycles>2</meta:editing-cycles>
    <meta:generator>OpenOffice/4.1.14$Unix OpenOffice.org_project/4114m1$Build-9811</meta:generator>
    <meta:document-statistic meta:object-count="1"/>
  </office:meta>
</office:document-meta>
</file>